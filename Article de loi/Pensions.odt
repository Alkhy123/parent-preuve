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ethink" svg:font-family="Rethink,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text-indent="0cm" style:auto-text-indent="false" fo:padding="0.049cm" fo:border="0.002cm solid #000000"/>
    </style:style>
    <style:style style:name="P2" style:family="paragraph" style:parent-style-name="Text_20_body">
      <style:paragraph-properties fo:margin-left="0cm" fo:margin-right="0cm" fo:margin-top="0cm" fo:margin-bottom="0cm" fo:text-indent="0cm" style:auto-text-indent="false" fo:padding="0.049cm" fo:border="0.002cm solid #000000"/>
    </style:style>
    <style:style style:name="P3" style:family="paragraph" style:parent-style-name="Text_20_body" style:list-style-name="L3">
      <style:paragraph-properties fo:margin-left="0cm" fo:margin-right="0cm" fo:margin-top="0cm" fo:margin-bottom="0cm" fo:text-align="start" style:justify-single-word="false" fo:orphans="2" fo:widows="2" fo:text-indent="0cm" style:auto-text-indent="false" fo:padding="0.049cm" fo:border="0.002cm solid #000000"/>
    </style:style>
    <style:style style:name="P4" style:family="paragraph" style:parent-style-name="Text_20_body" style:list-style-name="L4">
      <style:paragraph-properties fo:margin-left="0cm" fo:margin-right="0cm" fo:margin-top="0cm" fo:margin-bottom="0cm" fo:text-align="start" style:justify-single-word="false" fo:orphans="2" fo:widows="2" fo:text-indent="0cm" style:auto-text-indent="false" fo:padding="0.049cm" fo:border="0.002cm solid #000000"/>
    </style:style>
    <style:style style:name="T1" style:family="text">
      <style:text-properties style:text-underline-style="solid" style:text-underline-width="auto" style:text-underline-color="font-color"/>
    </style:style>
    <style:style style:name="T2" style:family="text">
      <style:text-properties fo:font-variant="normal" fo:text-transform="none" style:font-name="Rethink" fo:font-size="9pt" fo:letter-spacing="normal" fo:font-style="normal" fo:font-weight="bold"/>
    </style:style>
    <style:style style:name="T3" style:family="text">
      <style:text-properties fo:font-variant="normal" fo:text-transform="none" fo:color="#202020" style:font-name="Rethink" fo:font-size="11.25pt" fo:letter-spacing="normal" fo:font-style="normal" style:text-underline-style="solid" style:text-underline-width="auto" style:text-underline-color="font-color" fo:font-weight="bold"/>
    </style:style>
    <style:style style:name="T4" style:family="text">
      <style:text-properties fo:font-variant="normal" fo:text-transform="none" fo:color="#202020" style:font-name="Rethink" fo:font-size="11.25pt" fo:letter-spacing="normal" fo:font-style="normal" fo:font-weight="bol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ordalie.com/os/?view=agent&amp;id=7a86f27f-6385-41c0-96b6-632fa59080b6#" text:style-name="Internet_20_link" text:visited-style-name="Visited_20_Internet_20_Link"><text:span text:style-name="T1">Code civil, article 373-2-2</text:span></text:a> </text:p>
      <text:p text:style-name="P1"><text:span text:style-name="T2">C’est le texte central : en cas de séparation, la contribution à l’entretien et à l’éducation de l’enfant prend la forme d’une pension alimentaire ; l’article précise aussi les titres exécutoires possibles et l’intermédiation financière.</text:span> </text:p>
      <text:p text:style-name="P2"><text:a xlink:type="simple" xlink:href="https://ordalie.com/os/?view=agent&amp;id=7a86f27f-6385-41c0-96b6-632fa59080b6#" text:style-name="Internet_20_link" text:visited-style-name="Visited_20_Internet_20_Link"><text:span text:style-name="T3">Code civil, article 208</text:span></text:a><text:span text:style-name="T4"><text:line-break/>Il fixe le principe selon lequel les aliments sont accordés selon le besoin du créancier et les ressources du débiteur, avec possibilité d’une clause de variation de la pension.</text:span></text:p>
      <text:p text:style-name="P2"><text:a xlink:type="simple" xlink:href="https://ordalie.com/os/?view=agent&amp;id=7a86f27f-6385-41c0-96b6-632fa59080b6#" text:style-name="Internet_20_link" text:visited-style-name="Visited_20_Internet_20_Link"><text:span text:style-name="T3">Code civil, article 210</text:span></text:a><text:span text:style-name="T4"><text:line-break/>Il prévoit que, si le débiteur justifie qu’il ne peut pas payer la pension alimentaire, le juge peut ordonner une exécution en nature (hébergement, nourriture, entretien) au lieu du paiement en argent.</text:span></text:p>
      <text:p text:style-name="P1"/>
      <text:p text:style-name="P2"><text:a xlink:type="simple" xlink:href="https://ordalie.com/os/?view=agent&amp;id=7a86f27f-6385-41c0-96b6-632fa59080b6#" text:style-name="Internet_20_link" text:visited-style-name="Visited_20_Internet_20_Link"><text:span text:style-name="T3">Code des procédures civiles d’exécution, article L213-1</text:span></text:a><text:span text:style-name="T4"><text:line-break/>C’est le texte clef du paiement direct : il permet au créancier d’obtenir directement la pension auprès d’un tiers débiteur du débiteur, et il précise que la procédure est recevable dès qu’une échéance n’a pas été payée à son terme.</text:span></text:p>
      <text:list xml:id="list728556593368888891" text:style-name="L3">
        <text:list-item>
          <text:p text:style-name="P3"><text:a xlink:type="simple" xlink:href="https://ordalie.com/os/?view=agent&amp;id=7a86f27f-6385-41c0-96b6-632fa59080b6#" text:style-name="Internet_20_link" text:visited-style-name="Visited_20_Internet_20_Link"><text:span text:style-name="T3">Code des procédures civiles d’exécution, article L213-2</text:span></text:a><text:span text:style-name="T4"><text:line-break/>Il organise les effets du paiement direct : attribution prioritaire des sommes au bénéficiaire, à mesure qu’elles deviennent exigibles.</text:span></text:p>
        </text:list-item>
      </text:list>
      <text:p text:style-name="P1"/>
      <text:p text:style-name="P2"><text:a xlink:type="simple" xlink:href="https://ordalie.com/os/?view=agent&amp;id=7a86f27f-6385-41c0-96b6-632fa59080b6#" text:style-name="Internet_20_link" text:visited-style-name="Visited_20_Internet_20_Link"><text:span text:style-name="T3">Code pénal, article 227-3</text:span></text:a><text:span text:style-name="T4"><text:line-break/>C’est le texte pénal principal : le fait de demeurer plus de deux mois sans s’acquitter intégralement d’une pension ou contribution due au titre d’une obligation familiale constitue l’infraction d’abandon de famille.</text:span></text:p>
      <text:list xml:id="list1773028017365364428" text:style-name="L4">
        <text:list-item>
          <text:p text:style-name="P4"><text:a xlink:type="simple" xlink:href="https://ordalie.com/os/?view=agent&amp;id=7a86f27f-6385-41c0-96b6-632fa59080b6#" text:style-name="Internet_20_link" text:visited-style-name="Visited_20_Internet_20_Link"><text:span text:style-name="T3">Code pénal, article 227-4</text:span></text:a><text:span text:style-name="T4"><text:line-break/>Texte complémentaire : il sanctionne notamment l’absence de notification du changement de domicile au créancier et, en cas d’intermédiation, l’abstention de transmettre les informations nécessaires.</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ethink" svg:font-family="Rethink,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11S</meta:editing-duration>
    <meta:editing-cycles>3</meta:editing-cycles>
    <meta:generator>OpenOffice/4.1.14$Win32 OpenOffice.org_project/4114m1$Build-9811</meta:generator>
    <dc:date>2026-06-02T18:58:40.40</dc:date>
    <meta:document-statistic meta:table-count="0" meta:image-count="0" meta:object-count="0" meta:page-count="1" meta:paragraph-count="8" meta:word-count="248" meta:character-count="1639"/>
    <meta:user-defined meta:name="Info 1"/>
    <meta:user-defined meta:name="Info 2"/>
    <meta:user-defined meta:name="Info 3"/>
    <meta:user-defined meta:name="Info 4"/>
  </office:meta>
</office:document-meta>
</file>